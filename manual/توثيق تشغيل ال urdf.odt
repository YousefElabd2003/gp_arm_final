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1000003E7E5D1CAD95D5F32AE.png" manifest:media-type="image/png"/>
  <manifest:file-entry manifest:full-path="Pictures/10000001000004A20000039E2B3267E0D0806B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2133c9" officeooo:paragraph-rsid="002133c9"/>
    </style:style>
    <style:style style:name="P3" style:family="paragraph" style:parent-style-name="Standard">
      <style:text-properties officeooo:rsid="002133c9" officeooo:paragraph-rsid="002275a6"/>
    </style:style>
    <style:style style:name="P4" style:family="paragraph" style:parent-style-name="Standard">
      <style:text-properties officeooo:rsid="002133c9" officeooo:paragraph-rsid="00248d6b"/>
    </style:style>
    <style:style style:name="P5" style:family="paragraph" style:parent-style-name="Standard">
      <style:text-properties officeooo:rsid="002133c9" officeooo:paragraph-rsid="0025d872"/>
    </style:style>
    <style:style style:name="P6" style:family="paragraph" style:parent-style-name="Standard">
      <style:text-properties officeooo:rsid="00248d6b" officeooo:paragraph-rsid="00248d6b"/>
    </style:style>
    <style:style style:name="P7" style:family="paragraph" style:parent-style-name="Standard">
      <style:text-properties officeooo:rsid="0024b8d3" officeooo:paragraph-rsid="0024b8d3"/>
    </style:style>
    <style:style style:name="P8" style:family="paragraph" style:parent-style-name="Standard">
      <style:text-properties officeooo:rsid="00269f31" officeooo:paragraph-rsid="00269f31"/>
    </style:style>
    <style:style style:name="P9" style:family="paragraph" style:parent-style-name="Preformatted_20_Text" style:list-style-name="L2">
      <style:paragraph-properties fo:margin-top="0in" fo:margin-bottom="0.1965in" style:contextual-spacing="false"/>
    </style:style>
    <style:style style:name="P10" style:family="paragraph" style:parent-style-name="Standard">
      <style:text-properties officeooo:rsid="002133c9" officeooo:paragraph-rsid="002133c9"/>
    </style:style>
    <style:style style:name="P11" style:family="paragraph" style:parent-style-name="Standard">
      <style:text-properties officeooo:rsid="002133c9" officeooo:paragraph-rsid="00248d6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أولاً: تشريح المشكلة (ليه الروبوت كان مخفي؟)</text:h>
      <text:p text:style-name="Text_20_body">اللي حصل معاك مكنش مشكلة واحدة، دول كانوا <text:span text:style-name="T1">ثلاثة أفخاخ</text:span> متداخلين في عالم ROS2:</text:p>
      <text:list xml:id="list591832165" text:style-name="L1">
        <text:list-item>
          <text:p text:style-name="P12"><text:span text:style-name="T1">فخ التوقيت </text:span><text:span text:style-name="T2">(QoS Mismatch - </text:span><text:span text:style-name="T1">المشكلة الأساسية</text:span><text:span text:style-name="T2">):</text:span></text:p>
          <text:list>
            <text:list-item>
              <text:p text:style-name="P12"><text:span text:style-name="T1">إيه اللي بيحصل؟</text:span> النود اللي بتقرأ الـ URDF اسمها <text:span text:style-name="Source_20_Text">robot_state_publisher</text:span>. النود دي بتشتغل و"تذيع" شكل الروبوت مرة واحدة بس أول ما تعمل Launch (زي الراديو). لو RViz فتح بعدها بثانية واحدة، بيكون فاته البث ومبيشوفش حاجة.</text:p>
            </text:list-item>
            <text:list-item>
              <text:p text:style-name="P12"><text:span text:style-name="T1">الحل اللي عملناه</text:span><text:span text:style-name="T2">:</text:span> لما غيرنا الـ <text:span text:style-name="Source_20_Text">Durability Policy</text:span> لـ <text:span text:style-name="Source_20_Text">Transient Local</text:span>، إحنا قولنا لـ RViz: "لو سمحت، روح اسأل النود دي عن آخر رسالة بعتتها قبل ما إنت تفتح"، فساعتها قدر يستلم الهيكل العظمي للروبوت.</text:p>
            </text:list-item>
          </text:list>
        </text:list-item>
        <text:list-item>
          <text:p text:style-name="P12"><text:span text:style-name="T1">فخ الخطأ البشري </text:span><text:span text:style-name="T2">(Empty Topic Name):</text:span></text:p>
          <text:list>
            <text:list-item>
              <text:p text:style-name="P12"><text:span text:style-name="T1">إيه اللي بيحصل؟</text:span> وإنت بتغير إعدادات الـ <text:span text:style-name="Source_20_Text">Transient Local</text:span>، بالغلط مسحت اسم الـ Topic اللي هو <text:span text:style-name="Source_20_Text">/robot_description</text:span>.</text:p>
            </text:list-item>
            <text:list-item>
              <text:p text:style-name="P12"><text:span text:style-name="T1">النتيجة</text:span><text:span text:style-name="T2">:</text:span> RViz بقى مستعد يقرا الرسالة القديمة، بس مش عارف يروح يقرأها من أنهي قناة! بمجرد ما كتبنا اسم القناة تاني أو استخدمنا مسار الملف المباشر (Direct File)، الرؤية وضحت.</text:p>
            </text:list-item>
          </text:list>
        </text:list-item>
        <text:list-item>
          <text:p text:style-name="P12"><text:span text:style-name="T1">فخ المنطقة والأرقام </text:span><text:span text:style-name="T2">(The Locale Bug - </text:span><text:span text:style-name="T1">القاتل الصامت</text:span><text:span text:style-name="T2">):</text:span></text:p>
          <text:list>
            <text:list-item>
              <text:p text:style-name="P12"><text:span text:style-name="T1">إيه اللي بيحصل؟</text:span> في إعدادات اللينكس في منطقتنا، النظام بيستخدم "الفاصلة" (,) بدل "النقطة" (.) في الكسور. ملفات الـ STL والـ URDF كلها أرقام عشرية (زي <text:span text:style-name="Source_20_Text">0.05</text:span>). الـ RViz بيقرأها <text:span text:style-name="Source_20_Text">0,05</text:span> فبيفهمها على إنها نص مش رقم، وبيفشل في رسم الـ 3D Meshes تماماً بدون أي إيرور.</text:p>
            </text:list-item>
            <text:list-item>
              <text:p text:style-name="P12"><text:span text:style-name="T1">الحل اللي عملناه</text:span><text:span text:style-name="T2">:</text:span> أمر <text:span text:style-name="Source_20_Text">export LC_NUMERIC="en_US.UTF-8"</text:span> أجبر اللينكس يستخدم النقطة الأمريكية في الحسابات، فظهرت المجسمات بحجمها الطبيعي.</text:p>
            </text:list-item>
          </text:list>
        </text:list-item>
      </text:list>
      <text:p text:style-name="Horizontal_20_Line"/>
      <text:h text:style-name="Heading_20_3" text:outline-level="3">ثانياً: دليل التشغيل الشامل (لأي حد هينزل الريبو)</text:h>
      <text:p text:style-name="Text_20_body">إليك التقرير الشامل اللي تقدر تنسخه وتحطه في ملف <text:span text:style-name="Source_20_Text">README.md</text:span> عشان أي حد يستخدم الريبو ده يدعيلك:</text:p>
      <text:h text:style-name="Heading_20_2" text:outline-level="2">📖 دليل تشغيل حزمة <text:span text:style-name="Source_20_Text">my_robot_description</text:span></text:h>
      <text:p text:style-name="Text_20_body">هذه الحزمة تحتوي على الوصف الهندسي (URDF/Xacro) وملفات الأبعاد الثلاثية (STL) لروبوت ذو قاعدة متحركة وذراع آلي بـ 6 درجات حرية (6-DOF)، بالإضافة إلى كاميرا D435 وليدار.</text:p>
      <text:h text:style-name="Heading_20_3" text:outline-level="3">1️⃣ المتطلبات المسبقة (Dependencies)</text:h>
      <text:p text:style-name="Text_20_body">قبل تحميل الحزمة، تأكد من تثبيت المكتبات الأساسية لـ ROS2 (استبدل <text:span text:style-name="Source_20_Text">humble</text:span> بإصدارك إذا لزم الأمر):</text:p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ros-humble-joint-state-publisher-gui ros-humble-robot-state-publisher ros-humble-xacro ros-humble-rviz2</text:span></text:p>
      <text:h text:style-name="Heading_20_3" text:outline-level="3"><text:soft-page-break/>2️⃣ تحميل الحزمة وبنائها (Clone &amp; Build)</text:h>
      <text:p text:style-name="Text_20_body">قم بفتح الطرفية (Terminal) وتنفيذ الأوامر التالية بالترتيب:</text:p>
      <text:p text:style-name="Text_20_body">Bash</text:p>
      <text:p text:style-name="Preformatted_20_Text"><text:span text:style-name="Source_20_Text"># الدخول إلى مساحة العمل</text:span></text:p>
      <text:p text:style-name="Preformatted_20_Text"><text:span text:style-name="Source_20_Text">cd ~/ros2_ws/src</text:span></text:p>
      <text:p text:style-name="Preformatted_20_Text"/>
      <text:p text:style-name="Preformatted_20_Text"><text:span text:style-name="Source_20_Text"># تحميل الحزمة</text:span></text:p>
      <text:p text:style-name="Preformatted_20_Text"><text:span text:style-name="Source_20_Text">git clone https://github.com/mo137830/robot_description_bring-up.git</text:span></text:p>
      <text:p text:style-name="Preformatted_20_Text"><text:span text:style-name="Source_20_Text">mv robot_description_bring-up/src/my_robot_description .</text:span></text:p>
      <text:p text:style-name="Preformatted_20_Text"><text:span text:style-name="Source_20_Text">rm -rf robot_description_bring-up</text:span></text:p>
      <text:p text:style-name="Preformatted_20_Text"/>
      <text:p text:style-name="Preformatted_20_Text"><text:span text:style-name="Source_20_Text"># بناء الحزمة</text:span></text:p>
      <text:p text:style-name="Preformatted_20_Text"><text:span text:style-name="Source_20_Text">cd ~/ros2_ws</text:span></text:p>
      <text:p text:style-name="P1"><text:span text:style-name="Source_20_Text">colcon build --packages-select my_robot_description</text:span></text:p>
      <text:h text:style-name="Heading_20_3" text:outline-level="3">3️⃣ حل مشكلة الأرقام العشرية (مهم جداً للمستخدمين العرب) 🚨</text:h>
      <text:p text:style-name="Text_20_body">لتجنب اختفاء المجسمات (3D Meshes) بسبب اختلاف تنسيق الفاصلة العشرية في نظام اللينكس، يجب تنفيذ هذا الأمر قبل التشغيل:</text:p>
      <text:p text:style-name="Text_20_body">Bash</text:p>
      <text:p text:style-name="P1"><text:span text:style-name="Source_20_Text">export LC_NUMERIC="en_US.UTF-8"</text:span></text:p>
      <text:p text:style-name="Text_20_body"><text:span text:style-name="T3">(</text:span><text:span text:style-name="T4">يُنصح بإضافة هذا الأمر إلى ملف </text:span><text:span text:style-name="Source_20_Text"><text:span text:style-name="T3">~/.bashrc</text:span></text:span><text:span text:style-name="T3"> </text:span><text:span text:style-name="T4">لجعله دائماً</text:span><text:span text:style-name="T3">).</text:span></text:p>
      <text:h text:style-name="Heading_20_3" text:outline-level="3">4️⃣ التشغيل (Launch)</text:h>
      <text:p text:style-name="Text_20_body">في نفس الطرفية، قم بعمل Source وتشغيل ملف الإطلاق:</text:p>
      <text:p text:style-name="Text_20_body">Bash</text:p>
      <text:p text:style-name="Preformatted_20_Text"><text:span text:style-name="Source_20_Text">source install/setup.bash</text:span></text:p>
      <text:p text:style-name="P1"><text:span text:style-name="Source_20_Text">ros2 launch my_robot_description view_robot.launch.py</text:span></text:p>
      <text:h text:style-name="Heading_20_3" text:outline-level="3">5️⃣ إعدادات RViz (RViz Configuration)</text:h>
      <text:p text:style-name="Text_20_body">عند فتح برنامج RViz لأول مرة، قد تظهر الشاشة فارغة. اتبع الخطوات التالية لإظهار الروبوت:</text:p>
      <text:list xml:id="list145294964" text:style-name="L2">
        <text:list-item>
          <text:p text:style-name="P13">في القائمة اليسرى، قم بتغيير <text:span text:style-name="Source_20_Text"><text:span text:style-name="T2">Fixed Frame</text:span></text:span> من <text:span text:style-name="Source_20_Text">map</text:span> إلى <text:span text:style-name="Source_20_Text"><text:span text:style-name="T2">base_link</text:span></text:span>.</text:p>
        </text:list-item>
        <text:list-item>
          <text:p text:style-name="P13">اضغط على زر <text:span text:style-name="T2">Add</text:span> بالأسفل، واختر <text:span text:style-name="Source_20_Text"><text:span text:style-name="T2">RobotModel</text:span></text:span>.</text:p>
        </text:list-item>
        <text:list-item>
          <text:p text:style-name="P13">قم بتوسيع قائمة <text:span text:style-name="Source_20_Text">RobotModel</text:span>، وابحث عن <text:span text:style-name="Source_20_Text"><text:span text:style-name="T2">Description Source</text:span></text:span>.</text:p>
        </text:list-item>
        <text:list-item>
          <text:p text:style-name="P13">قم بتغيير القيمة من <text:span text:style-name="Source_20_Text">Topic</text:span> إلى <text:span text:style-name="Source_20_Text"><text:span text:style-name="T2">File</text:span></text:span>.</text:p>
        </text:list-item>
        <text:list-item>
          <text:p text:style-name="P13">في حقل <text:span text:style-name="Source_20_Text"><text:span text:style-name="T2">Description File</text:span></text:span> الذي سيظهر، انسخ هذا المسار:</text:p>
          <text:p text:style-name="P13">Plaintext</text:p>
          <text:p text:style-name="P9"><text:span text:style-name="Source_20_Text">package://my_robot_description/urdf/final2.xml</text:span></text:p>
        </text:list-item>
      </text:list>
      <text:p text:style-name="Text_20_body">الآن سيظهر الروبوت بالكامل، ويمكنك التحكم في المفاصل باستخدام نافذة <text:span text:style-name="Source_20_Text">Joint State Publisher</text:span>.</text:p>
      <text:p text:style-name="Horizontal_20_Line"><text:soft-page-break/></text:p>
      <text:p text:style-name="P2">لتشغيل moveit</text:p>
      <text:p text:style-name="P2"/>
      <text:p text:style-name="P3">cd ~/ros2_ws<text:line-break/>colcon build</text:p>
      <text:p text:style-name="P4">source /opt/ros/humble/setup.bash</text:p>
      <text:p text:style-name="P2">source install/setup.bash</text:p>
      <text:p text:style-name="P2">ros2 launch my_robot_moveit_config demo.launch.py</text:p>
      <text:p text:style-name="P2"/>
      <text:p text:style-name="P2"/>
      <text:p text:style-name="P6">لتشغيل نود بايثون اللي بتستقبل الزوايا من moveit وتبعتها لل esp</text:p>
      <text:p text:style-name="P6"/>
      <text:p text:style-name="P2"># 1. ارجع للفولدر الرئيسي للورك سبيس</text:p>
      <text:p text:style-name="P2">cd ~/ros2_ws</text:p>
      <text:p text:style-name="P2"># 2. اعمل سورس لنسخة ROS الأصلية (عشان مكتبة rclpy تشتغل)</text:p>
      <text:p text:style-name="P2">source /opt/ros/humble/setup.bash</text:p>
      <text:p text:style-name="P2"># 3. اعمل سورس للورك سبيس بتاعتك</text:p>
      <text:p text:style-name="P2">source install/setup.bash</text:p>
      <text:p text:style-name="P2"># 4. ادي صلاحية للبورت بتاع الـ ESP32 (زي ما إنت عملت صح)</text:p>
      <text:p text:style-name="P2">sudo chmod a+rw /dev/ttyACM0</text:p>
      <text:p text:style-name="P2"># 5. شغل سكريبت البايثون بتاعك وإنت واقف مكانك بره</text:p>
      <text:p text:style-name="P2">python3 src/my_robot_moveit_config/scripts/moveit_serial_bridge.py</text:p>
      <text:p text:style-name="P7">لعمل بناء جزئي</text:p>
      <text:p text:style-name="P4">colcon build --packages-select my_robot_control</text:p>
      <text:p text:style-name="P4"/>
      <text:p text:style-name="P4"/>
      <text:p text:style-name="P4"/>
      <text:p text:style-name="P4"/>
      <text:p text:style-name="P5">sudo chmod a+rw /dev/ttyACM0</text:p>
      <text:p text:style-name="P5">(ملاحظة: الأمر ده بيدي صلاحية مؤقتة لحد ما تفصل السلك، وهو الأسرع للتجربة دلوقتي).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اصلاح مشكلة limitation</text:p>
      <text:p text:style-name="P8"/>
      <text:p text:style-name="P8"><draw:frame draw:style-name="fr1" draw:name="Image1" text:anchor-type="char" svg:width="5.3598in" svg:height="4.1846in" draw:z-index="0"><draw:image xlink:href="Pictures/10000001000004A20000039E2B3267E0D0806B06.png" xlink:type="simple" xlink:show="embed" xlink:actuate="onLoad" draw:mime-type="image/png"/></draw:frame><text:line-break/>في urdf الاول بتبدا تعدل علي ال upper and lower حسب الزوايا في الواقع <text:line-break/>واتخلي بالك انها بالراديال<text:line-break/></text:p>
      <text:p text:style-name="P8"><draw:frame draw:style-name="fr1" draw:name="Image2" text:anchor-type="char" svg:width="5.4535in" svg:height="3.402in" draw:z-index="1"><draw:image xlink:href="Pictures/1000000100000641000003E7E5D1CAD95D5F32AE.png" xlink:type="simple" xlink:show="embed" xlink:actuate="onLoad" draw:mime-type="image/png"/></draw:frame>ومن ثم في ملف joint_limts,yamal <text:line-break/>اللي استخجرناه من moveit بضيف السطرين دول اللي في الصوره اللي هما <text:line-break/><text:soft-page-break/>max and min position 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6:34:37.296547614</meta:creation-date>
    <dc:date>2026-04-29T01:15:55.294080186</dc:date>
    <meta:editing-duration>PT2H33M25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5" meta:paragraph-count="75" meta:word-count="662" meta:character-count="4304" meta:non-whitespace-character-count="3726"/>
  </office:meta>
</office:document-meta>
</file>