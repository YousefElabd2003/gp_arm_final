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officeooo:rsid="000ed354" officeooo:paragraph-rsid="000ed354" style:font-size-asian="21pt" style:font-size-complex="24pt"/>
    </style:style>
    <style:style style:name="P2" style:family="paragraph" style:parent-style-name="Standard">
      <style:text-properties fo:font-size="13pt" officeooo:rsid="0011959b" officeooo:paragraph-rsid="0011959b" style:font-size-asian="13pt" style:font-size-complex="13pt"/>
    </style:style>
    <style:style style:name="P3" style:family="paragraph" style:parent-style-name="Standard">
      <style:text-properties fo:font-size="13pt" officeooo:rsid="0012df7c" officeooo:paragraph-rsid="0012df7c" style:font-size-asian="13pt" style:font-size-complex="13pt"/>
    </style:style>
    <style:style style:name="P4" style:family="paragraph" style:parent-style-name="Standard">
      <style:text-properties officeooo:paragraph-rsid="0011959b"/>
    </style:style>
    <style:style style:name="P5" style:family="paragraph" style:parent-style-name="Text_20_body" style:list-style-name="L2">
      <style:text-properties officeooo:paragraph-rsid="0011959b"/>
    </style:style>
    <style:style style:name="P6" style:family="paragraph" style:parent-style-name="Text_20_body" style:list-style-name="L3"/>
    <style:style style:name="T1" style:family="text">
      <style:text-properties officeooo:rsid="0011959b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1959b" style:font-size-asian="14pt" style:font-size-complex="16pt"/>
    </style:style>
    <style:style style:name="T4" style:family="text">
      <style:text-properties fo:font-size="12pt" officeooo:rsid="0011959b" style:font-size-asian="12pt" style:font-size-complex="12pt"/>
    </style:style>
    <style:style style:name="T5" style:family="text">
      <style:text-properties fo:font-size="13pt" officeooo:rsid="0011959b" style:font-size-asian="13pt" style:font-size-complex="13pt"/>
    </style:style>
    <style:style style:name="T6" style:family="text">
      <style:text-properties fo:font-size="15pt" officeooo:rsid="0011959b" style:font-size-asian="15pt" style:font-size-complex="15pt"/>
    </style:style>
    <style:style style:name="T7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<text:span text:style-name="T1">to run odometry node<text:line-break/></text:span><text:span text:style-name="T5">1- cd ~/ros2_ws</text:span></text:p>
      <text:p text:style-name="P2">2-colcon build --packages-select encoder_odometry<text:line-break/>3-source install/setup.bash</text:p>
      <text:p text:style-name="P2">4-ros2 run encoder_odometry encoder_odom_node --ros-args -p port:=/dev/ttyACM0</text:p>
      <text:p text:style-name="P2">5-new terminal</text:p>
      <text:p text:style-name="P2">6-source ~/ros2_ws/install/setup.bash</text:p>
      <text:p text:style-name="P2">7-ros2 topic echo /odom</text:p>
      <text:p text:style-name="P2">8-ros2 run rviz2 rviz2</text:p>
      <text:p text:style-name="P4"><text:span text:style-name="T5">9-</text:span> <text:span text:style-name="T7">Fixed Frame</text:span> <text:span text:style-name="T1">= </text:span><text:span text:style-name="Source_20_Text">odom</text:span>.</text:p>
      <text:list xml:id="list2743799576" text:style-name="L2">
        <text:list-item>
          <text:p text:style-name="P5"><text:s/>(<text:span text:style-name="T7">Add</text:span>) <text:span text:style-name="T7">TF</text:span> </text:p>
        </text:list-item>
      </text:list>
      <text:list xml:id="list2477057744" text:style-name="L3">
        <text:list-item>
          <text:p text:style-name="P6"><text:s/>(<text:span text:style-name="T7">Add</text:span>) <text:s/><text:span text:style-name="T7">Odometry</text:span> <text:span text:style-name="Source_20_Text">/odom</text:span>.</text:p>
        </text:list-item>
      </text:list>
      <text:p text:style-name="P3">Launch<text:line-break/>cd ~/ros2_ws</text:p>
      <text:p text:style-name="P3">colcon build --packages-select encoder_odometry</text:p>
      <text:p text:style-name="P3">source install/setup.bash</text:p>
      <text:p text:style-name="P3"/>
      <text:p text:style-name="P3">ros2 launch encoder_odometry odom_bringup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20:03:06.756204793</meta:creation-date>
    <dc:date>2026-01-27T00:40:44.581554352</dc:date>
    <meta:editing-duration>PT2H17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1" meta:character-count="492" meta:non-whitespace-character-count="446"/>
  </office:meta>
</office:document-meta>
</file>