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2278in"/>
    </style:style>
    <style:style style:name="Table1.B" style:family="table-column">
      <style:table-column-properties style:column-width="4.4653in"/>
    </style:style>
    <style:style style:name="Table1.A1" style:family="table-cell">
      <style:table-cell-properties style:vertical-align="middle" fo:padding="0.0194in" fo:border="0.05pt solid #00000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9569in"/>
    </style:style>
    <style:style style:name="Table2.B" style:family="table-column">
      <style:table-column-properties style:column-width="2.6986in"/>
    </style:style>
    <style:style style:name="Table2.C" style:family="table-column">
      <style:table-column-properties style:column-width="2.0375in"/>
    </style:style>
    <style:style style:name="Table2.A1" style:family="table-cell">
      <style:table-cell-properties style:vertical-align="middle" fo:padding="0.0194in" fo:border="0.05pt solid #000000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Heading_20_2">
      <style:paragraph-properties fo:margin-top="0in" fo:margin-bottom="0.0972in" style:contextual-spacing="false" fo:line-height="114%"/>
    </style:style>
    <style:style style:name="P3" style:family="paragraph" style:parent-style-name="Table_20_Contents">
      <style:paragraph-properties fo:margin-top="0in" fo:margin-bottom="0.0972in" style:contextual-spacing="false" fo:line-height="114%"/>
    </style:style>
    <style:style style:name="P4" style:family="paragraph" style:parent-style-name="Text_20_body">
      <style:paragraph-properties fo:margin-top="0in" fo:margin-bottom="0.0972in" style:contextual-spacing="false" fo:line-height="114%"/>
    </style:style>
    <style:style style:name="P5" style:family="paragraph" style:parent-style-name="Heading_20_3">
      <style:paragraph-properties fo:margin-top="0in" fo:margin-bottom="0.0835in" style:contextual-spacing="false" fo:line-height="114%"/>
    </style:style>
    <style:style style:name="P6" style:family="paragraph" style:parent-style-name="Preformatted_20_Text">
      <style:paragraph-properties fo:margin-top="0in" fo:margin-bottom="0in" style:contextual-spacing="false" fo:line-height="114%"/>
    </style:style>
    <style:style style:name="P7" style:family="paragraph" style:parent-style-name="Table_20_Contents">
      <style:paragraph-properties fo:margin-top="0in" fo:margin-bottom="0in" style:contextual-spacing="false" fo:line-height="114%"/>
    </style:style>
    <style:style style:name="P8" style:family="paragraph" style:parent-style-name="Preformatted_20_Text">
      <style:paragraph-properties fo:margin-top="0in" fo:margin-bottom="0in" style:contextual-spacing="false" fo:line-height="114%"/>
      <style:text-properties officeooo:paragraph-rsid="00183014"/>
    </style:style>
    <style:style style:name="P9" style:family="paragraph" style:parent-style-name="Table_20_Contents">
      <style:paragraph-properties fo:margin-top="0in" fo:margin-bottom="0.0972in" style:contextual-spacing="false" fo:line-height="114%"/>
      <style:text-properties style:font-name="Google Sans Text" fo:font-weight="bold"/>
    </style:style>
    <style:style style:name="P10" style:family="paragraph" style:parent-style-name="Text_20_body">
      <style:paragraph-properties fo:margin-top="0in" fo:margin-bottom="0.0972in" style:contextual-spacing="false" fo:line-height="114%"/>
      <style:text-properties style:font-name="Google Sans Text"/>
    </style:style>
    <style:style style:name="P11" style:family="paragraph" style:parent-style-name="Preformatted_20_Text" style:list-style-name="L3">
      <style:paragraph-properties fo:margin-top="0in" fo:margin-bottom="0.1965in" style:contextual-spacing="false"/>
    </style:style>
    <style:style style:name="P12" style:family="paragraph" style:parent-style-name="Preformatted_20_Text" style:list-style-name="L4">
      <style:paragraph-properties fo:margin-top="0in" fo:margin-bottom="0.1965in" style:contextual-spacing="false"/>
    </style:style>
    <style:style style:name="P13" style:family="paragraph" style:parent-style-name="Preformatted_20_Text" style:list-style-name="L5">
      <style:paragraph-properties fo:margin-top="0in" fo:margin-bottom="0.1965in" style:contextual-spacing="false"/>
    </style:style>
    <style:style style:name="P14" style:family="paragraph" style:parent-style-name="Standard">
      <style:text-properties officeooo:rsid="001c6842" officeooo:paragraph-rsid="001c6842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>
      <style:paragraph-properties fo:margin-top="0in" fo:margin-bottom="0.0972in" style:contextual-spacing="false" fo:line-height="114%" fo:padding="0in" fo:border="none"/>
    </style:style>
    <style:style style:name="P21" style:family="paragraph" style:parent-style-name="Text_20_body" style:list-style-name="L7">
      <style:paragraph-properties fo:margin-top="0in" fo:margin-bottom="0.0972in" style:contextual-spacing="false" fo:line-height="114%" fo:padding="0in" fo:border="none"/>
    </style:style>
    <style:style style:name="P22" style:family="paragraph" style:parent-style-name="Text_20_body" style:list-style-name="L8">
      <style:paragraph-properties fo:margin-top="0in" fo:margin-bottom="0.0972in" style:contextual-spacing="false" fo:line-height="114%" fo:padding="0in" fo:border="none"/>
    </style:style>
    <style:style style:name="P23" style:family="paragraph" style:parent-style-name="Text_20_body">
      <style:paragraph-properties fo:margin-top="0in" fo:margin-bottom="0.0972in" style:contextual-spacing="false" fo:line-height="114%"/>
      <style:text-properties style:font-name="Google Sans Text"/>
    </style:style>
    <style:style style:name="T1" style:family="text">
      <style:text-properties fo:font-style="italic"/>
    </style:style>
    <style:style style:name="T2" style:family="text">
      <style:text-properties style:font-style-complex="italic"/>
    </style:style>
    <style:style style:name="T3" style:family="text">
      <style:text-properties fo:font-weight="bold"/>
    </style:style>
    <style:style style:name="T4" style:family="text">
      <style:text-properties style:font-weight-complex="bold"/>
    </style:style>
    <style:style style:name="T5" style:family="text">
      <style:text-properties officeooo:rsid="00137083"/>
    </style:style>
    <style:style style:name="T6" style:family="text">
      <style:text-properties style:font-name="Google Sans"/>
    </style:style>
    <style:style style:name="T7" style:family="text">
      <style:text-properties style:font-name-complex="Google Sans"/>
    </style:style>
    <style:style style:name="T8" style:family="text">
      <style:text-properties style:font-name="Google Sans Text"/>
    </style:style>
    <style:style style:name="T9" style:family="text">
      <style:text-properties style:font-name="Google Sans Text" fo:font-weight="bold"/>
    </style:style>
    <style:style style:name="T10" style:family="text">
      <style:text-properties style:font-name="Google Sans Text" fo:font-style="italic"/>
    </style:style>
    <style:style style:name="T11" style:family="text">
      <style:text-properties style:font-name-complex="Google Sans Text"/>
    </style:style>
    <style:style style:name="T12" style:family="text">
      <style:text-properties style:font-name-complex="Google Sans Text" style:font-weight-complex="bold"/>
    </style:style>
    <style:style style:name="T13" style:family="text">
      <style:text-properties style:font-name-complex="Google Sans Text" style:font-style-complex="italic"/>
    </style:style>
    <style:style style:name="T14" style:family="text">
      <style:text-properties officeooo:rsid="00160fd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h text:style-name="Heading_20_1" text:outline-level="1">📘 دليل تشغيل كاميرا Orbbec Astra Pro (ROS 2 Humble)</text:h>
      <text:h text:style-name="Heading_20_2" text:outline-level="2">🚀 أولاً: خطوات التشغيل اليومية (كل مرة تشغل فيها الروبوت)</text:h>
      <text:p text:style-name="Text_20_body">هذه هي الخطوات التي ستقوم بها في كل مرة تريد استخدام الكاميرا مستقبلاً.</text:p>
      <text:h text:style-name="Heading_20_3" text:outline-level="3">1. توصيل الكاميرا</text:h>
      <text:list xml:id="list3507810828" text:style-name="L1">
        <text:list-item>
          <text:p text:style-name="P15">وصل كابل الـ USB الخاص بالكاميرا باللابتوب (تأكد من استخدام منفذ USB 3.0 للأداء الأفضل، لكن 2.0 يعمل أيضاً).</text:p>
        </text:list-item>
      </text:list>
      <text:h text:style-name="Heading_20_3" text:outline-level="3">2. تشغيل الكاميرا (Terminal 1)</text:h>
      <text:p text:style-name="Text_20_body">افتح تيرمينال جديد واكتب الأوامر التالية:</text:p>
      <text:p text:style-name="Text_20_body">Bash</text:p>
      <text:p text:style-name="Preformatted_20_Text"><text:span text:style-name="Source_20_Text"># تفعيل مساحة العمل (ضروري في كل تيرمينال جديد)</text:span></text:p>
      <text:p text:style-name="Preformatted_20_Text"><text:span text:style-name="Source_20_Text">source ~/ros2_ws/install/setup.bash</text:span></text:p>
      <text:p text:style-name="Preformatted_20_Text"/>
      <text:p text:style-name="Preformatted_20_Text"><text:span text:style-name="Source_20_Text"># تشغيل الكاميرا باستخدام ملف الإطلاق الخاص بنسخة الـ Pro</text:span></text:p>
      <text:p text:style-name="P1"><text:span text:style-name="Source_20_Text">ros2 launch astra_camera astra_pro.launch.xml</text:span></text:p>
      <text:p text:style-name="Text_20_body"><text:span text:style-name="T1">(</text:span><text:span text:style-name="T2">إذا لم تظهر أخطاء وتوقف الكلام عند </text:span><text:span text:style-name="Source_20_Text"><text:span text:style-name="T1">device started</text:span></text:span><text:span text:style-name="T2">، فالكاميرا تعمل</text:span><text:span text:style-name="T1">).</text:span></text:p>
      <text:h text:style-name="Heading_20_3" text:outline-level="3">3. عرض الصورة والبيانات (Terminal 2)</text:h>
      <text:p text:style-name="Text_20_body">افتح تيرمينال جديد لرؤية ما تراه الكاميرا:</text:p>
      <text:p text:style-name="Text_20_body">Bash</text:p>
      <text:p text:style-name="Preformatted_20_Text"><text:span text:style-name="Source_20_Text"># تفعيل الـ ROS</text:span></text:p>
      <text:p text:style-name="Preformatted_20_Text"><text:span text:style-name="Source_20_Text">source /opt/ros/humble/setup.bash</text:span></text:p>
      <text:p text:style-name="Preformatted_20_Text"/>
      <text:p text:style-name="Preformatted_20_Text"><text:span text:style-name="Source_20_Text"># تشغيل أداة العرض</text:span></text:p>
      <text:p text:style-name="P1"><text:span text:style-name="Source_20_Text">ros2 run rviz2 rviz2</text:span></text:p>
      <text:p text:style-name="Text_20_body"><text:span text:style-name="T4">داخل </text:span><text:span text:style-name="T3">Rviz:</text:span></text:p>
      <text:list xml:id="list2212908070" text:style-name="L2">
        <text:list-item>
          <text:p text:style-name="P16">غيّر <text:span text:style-name="T3">Fixed Frame</text:span> إلى <text:span text:style-name="Source_20_Text">camera_link</text:span>.</text:p>
        </text:list-item>
        <text:list-item>
          <text:p text:style-name="P16">اضغط <text:span text:style-name="T3">Add</text:span> -&gt; <text:span text:style-name="T3">By Topic</text:span>.</text:p>
        </text:list-item>
        <text:list-item>
          <text:p text:style-name="P16">اختر <text:span text:style-name="Source_20_Text">/camera/color/image_raw</text:span> (للصورة الألوان).</text:p>
        </text:list-item>
        <text:list-item>
          <text:p text:style-name="P16">اختر <text:span text:style-name="Source_20_Text">/camera/depth/points</text:span> (للرؤية ثلاثية الأبعاد Point Cloud).</text:p>
        </text:list-item>
      </text:list>
      <text:p text:style-name="Horizontal_20_Line"/>
      <text:h text:style-name="Heading_20_2" text:outline-level="2"><text:soft-page-break/>🛠️ ثانياً: توثيق عملية التثبيت (للمرجع فقط)</text:h>
      <text:p text:style-name="Text_20_body">هذه الخطوات قمنا بها بالفعل ("One-time setup")، ولا تحتاج لتكرارها إلا إذا حذفت النظام أو قمت بتثبيته على جهاز جديد.</text:p>
      <text:h text:style-name="Heading_20_3" text:outline-level="3">1. تثبيت المكتبات الأساسية</text:h>
      <text:p text:style-name="Text_20_body">Bash</text:p>
      <text:p text:style-name="Preformatted_20_Text"><text:span text:style-name="Source_20_Text">sudo apt update</text:span></text:p>
      <text:p text:style-name="P1"><text:span text:style-name="Source_20_Text">sudo apt install libuvc-dev libgflags-dev nlohmann-json3-dev libgoogle-glog-dev ros-humble-image-transport ros-humble-image-publisher</text:span></text:p>
      <text:h text:style-name="Heading_20_3" text:outline-level="3">2. تجهيز مساحة العمل (Workspace)</text:h>
      <text:p text:style-name="Text_20_body">Bash</text:p>
      <text:p text:style-name="Preformatted_20_Text"><text:span text:style-name="Source_20_Text">mkdir -p ~/ros2_ws/src</text:span></text:p>
      <text:p text:style-name="Preformatted_20_Text"><text:span text:style-name="Source_20_Text">cd ~/ros2_ws/src</text:span></text:p>
      <text:p text:style-name="P1"><text:span text:style-name="Source_20_Text">git clone https://github.com/orbbec/ros2_astra_camera.git</text:span></text:p>
      <text:h text:style-name="Heading_20_3" text:outline-level="3">3. تثبيت قواعد الـ USB (Udev Rules)</text:h>
      <text:p text:style-name="Text_20_body">للسماح للنظام برؤية الكاميرا دون الحاجة لصلاحيات <text:span text:style-name="Source_20_Text">sudo</text:span> في كل مرة.</text:p>
      <text:p text:style-name="Text_20_body">Bash</text:p>
      <text:p text:style-name="Preformatted_20_Text"><text:span text:style-name="Source_20_Text">cd ~/ros2_ws/src/ros2_astra_camera/astra_camera/scripts</text:span></text:p>
      <text:p text:style-name="Preformatted_20_Text"><text:span text:style-name="Source_20_Text">sudo bash install.sh</text:span></text:p>
      <text:p text:style-name="P1"><text:span text:style-name="Source_20_Text">sudo udevadm control --reload-rules &amp;&amp; sudo udevadm trigger</text:span></text:p>
      <text:h text:style-name="Heading_20_3" text:outline-level="3">4. بناء الحزمة (Build)</text:h>
      <text:p text:style-name="Text_20_body">Bash</text:p>
      <text:p text:style-name="Preformatted_20_Text"><text:span text:style-name="Source_20_Text">cd ~/ros2_ws</text:span></text:p>
      <text:p text:style-name="P1"><text:span text:style-name="Source_20_Text">colcon build --symlink-install --packages-select astra_camera_msgs astra_camera</text:span></text:p>
      <text:p text:style-name="Horizontal_20_Line"/>
      <text:h text:style-name="Heading_20_2" text:outline-level="2">⚠️ ثالثاً: سجل المشاكل والحلول (Troubleshooting Log)</text:h>
      <text:p text:style-name="Text_20_body">هذه هي المشاكل التي واجهناها أثناء التثبيت وكيف تم حلها، لتوثيق الخبرة الهندسية.</text:p>
      <text:h text:style-name="Heading_20_3" text:outline-level="3">المشكلة 1: خطأ في ربط بايثون (Python Linking Error)</text:h>
      <text:list xml:id="list1163996832" text:style-name="L3">
        <text:list-item>
          <text:p text:style-name="P17"><text:span text:style-name="T4">الخطأ</text:span><text:span text:style-name="T3">:</text:span> ظهور رسالة <text:span text:style-name="Source_20_Text">recompile with -fPIC</text:span> وفشل البناء بسبب <text:span text:style-name="Source_20_Text">/usr/local/lib/libpython3.10.a</text:span>.</text:p>
        </text:list-item>
        <text:list-item>
          <text:p text:style-name="P17"><text:span text:style-name="T4">السبب</text:span><text:span text:style-name="T3">:</text:span> وجود نسخة بايثون مثبتة يدوياً (Static Library) تتعارض مع نسخة النظام.</text:p>
        </text:list-item>
        <text:list-item>
          <text:p text:style-name="P17"><text:span text:style-name="T4">الحل</text:span><text:span text:style-name="T3">:</text:span> إخفاء الملف المسبب للمشكلة لإجبار النظام على استخدام النسخة الأصلية.</text:p>
          <text:p text:style-name="P17">Bash</text:p>
          <text:p text:style-name="P11"><text:soft-page-break/><text:span text:style-name="Source_20_Text">sudo mv /usr/local/lib/libpython3.10.a /usr/local/lib/libpython3.10.a.bak</text:span></text:p>
        </text:list-item>
      </text:list>
      <text:h text:style-name="Heading_20_3" text:outline-level="3">المشكلة 2: مكتبة <text:span text:style-name="Source_20_Text">libuvc</text:span> مفقودة</text:h>
      <text:list xml:id="list2926171861" text:style-name="L4">
        <text:list-item>
          <text:p text:style-name="P18"><text:span text:style-name="T4">الخطأ</text:span><text:span text:style-name="T3">:</text:span> <text:span text:style-name="Source_20_Text">None of the required 'libuvc' found</text:span>.</text:p>
        </text:list-item>
        <text:list-item>
          <text:p text:style-name="P18"><text:span text:style-name="T4">السبب</text:span><text:span text:style-name="T3">:</text:span> الحزمة تحتاج لمكتبة التعامل مع الـ USB Video Class وهي غير مثبتة افتراضياً.</text:p>
        </text:list-item>
        <text:list-item>
          <text:p text:style-name="P18"><text:span text:style-name="T4">الحل</text:span><text:span text:style-name="T3">:</text:span> تثبيت المكتبة الناقصة.</text:p>
          <text:p text:style-name="P18">Bash</text:p>
          <text:p text:style-name="P12"><text:span text:style-name="Source_20_Text">sudo apt install libuvc-dev</text:span></text:p>
        </text:list-item>
      </text:list>
      <text:h text:style-name="Heading_20_3" text:outline-level="3">المشكلة 3: اختفاء ملف <text:span text:style-name="Source_20_Text">astra_mini.launch.xml</text:span></text:h>
      <text:list xml:id="list2894327195" text:style-name="L5">
        <text:list-item>
          <text:p text:style-name="P19"><text:span text:style-name="T4">الخطأ</text:span><text:span text:style-name="T3">:</text:span> <text:span text:style-name="Source_20_Text">file 'astra_mini.launch.xml' was not found</text:span>.</text:p>
        </text:list-item>
        <text:list-item>
          <text:p text:style-name="P19"><text:span text:style-name="T4">السبب</text:span><text:span text:style-name="T3">:</text:span> تحديث الحزمة من المصدر وتغيير أسماء الملفات، بالإضافة لامتلاكنا نسخة "Pro" التي تتطلب ملفاً مختلفاً.</text:p>
        </text:list-item>
        <text:list-item>
          <text:p text:style-name="P19"><text:span text:style-name="T4">الحل</text:span><text:span text:style-name="T3">:</text:span> استخدام ملف الإطلاق الصحيح المتوافق مع الكاميرا:</text:p>
          <text:p text:style-name="P19">Bash</text:p>
          <text:p text:style-name="P13"><text:span text:style-name="Source_20_Text">ros2 launch astra_camera astra_pro.launch.xml</text:span></text:p>
        </text:list-item>
      </text:list>
      <text:p text:style-name="Horizontal_20_Line"/>
      <text:p text:style-name="Text_20_body"><text:span text:style-name="T4">نصيحة أخيرة</text:span><text:span text:style-name="T3">:</text:span> احتفظ بهذا الملف في مجلد المشروع، سيوفر عليك ساعات من البحث في المستقبل! بالتوفيق يا هندسة في مشروع الروبوت. 🤖</text:p>
      <text:p text:style-name="Standard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span text:style-name="T5">version 2<text:line-break/></text:span></text:p>
      <text:h text:style-name="P2" text:outline-level="2"><text:span text:style-name="T6">1. </text:span><text:span text:style-name="T7">الهدف من المرحلة الحالية </text:span><text:span text:style-name="T6">(Project Objective)</text:span></text:h>
      <text:p text:style-name="P4"><text:span text:style-name="T11">بناء نظام رؤية حاسوبية </text:span><text:span text:style-name="T8">(Computer Vision) </text:span><text:span text:style-name="T11">متكامل يعتمد على موديل </text:span><text:span text:style-name="T9">YOLOv8-Pose</text:span><text:span text:style-name="T8"> </text:span><text:span text:style-name="T11">لاكتشاف أماكن </text:span><text:span text:style-name="T8">"</text:span><text:span text:style-name="T11">أوكرة الباب</text:span><text:span text:style-name="T8">" (Lever) </text:span><text:span text:style-name="T11">وتحديد إحداثياتها في الفراغ </text:span><text:span text:style-name="T8">$(x, y, z)$ </text:span><text:span text:style-name="T11">بالنسبة لقاعدة الروبوت، تمهيداً لتحريك الذراع الآلي نحوها</text:span><text:span text:style-name="T8">.</text:span></text:p>
      <text:p text:style-name="Horizontal_20_Line"/>
      <text:h text:style-name="P2" text:outline-level="2"><text:span text:style-name="T6">2. </text:span><text:span text:style-name="T7">هيكلة ملفات النظام </text:span><text:span text:style-name="T6">(Package Structure)</text:span></text:h>
      <text:p text:style-name="P4"><text:span text:style-name="T11">تم تحويل المجلد العادي إلى </text:span><text:span text:style-name="T9">ROS2 Python Package</text:span><text:span text:style-name="T8"> </text:span><text:span text:style-name="T11">رسمية لضمان قدرة النظام على التعامل مع التيرمينال والـ </text:span><text:span text:style-name="T8">Launch files.</text:span></text:p>
      <text:h text:style-name="P5" text:outline-level="3"><text:soft-page-break/><text:span text:style-name="T12">الملفات الأساسية ووظائفها</text:span><text:span text:style-name="T9">: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<text:span text:style-name="Strong_20_Emphasis"><text:span text:style-name="T11">الملف</text:span></text:span></text:p>
            </table:table-cell>
            <table:table-cell table:style-name="Table1.A1" office:value-type="string">
              <text:p text:style-name="P7"><text:span text:style-name="Strong_20_Emphasis"><text:span text:style-name="T11">الوظيفة الأساسية</text:span></text:span></text:p>
            </table:table-cell>
          </table:table-row>
        </table:table-header-rows>
        <table:table-row>
          <table:table-cell table:style-name="Table1.A1" office:value-type="string">
            <text:p text:style-name="P3"><text:span text:style-name="Source_20_Text"><text:span text:style-name="T9">package.xml</text:span></text:span></text:p>
          </table:table-cell>
          <table:table-cell table:style-name="Table1.A1" office:value-type="string">
            <text:p text:style-name="P3"><text:span text:style-name="T8">"</text:span><text:span text:style-name="T11">شهادة ميلاد</text:span><text:span text:style-name="T8">" </text:span><text:span text:style-name="T11">الباكدج؛ يحتوي على الاسم، الإصدار، والمكتبات اللي بيعتمد عليها الكود </text:span><text:span text:style-name="T8">(Dependencies) </text:span><text:span text:style-name="T11">مثل </text:span><text:span text:style-name="Source_20_Text"><text:span text:style-name="T8">rclpy</text:span></text:span><text:span text:style-name="T8"> </text:span><text:span text:style-name="T11">و </text:span><text:span text:style-name="Source_20_Text"><text:span text:style-name="T8">cv_bridge</text:span></text:span><text:span text:style-name="T8">.</text:span>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9">setup.py</text:span></text:span></text:p>
          </table:table-cell>
          <table:table-cell table:style-name="Table1.A1" office:value-type="string">
            <text:p text:style-name="P3"><text:span text:style-name="T8">"</text:span><text:span text:style-name="T11">دليل التركيب</text:span><text:span text:style-name="T8">"</text:span><text:span text:style-name="T11">؛ بيعرف الـ </text:span><text:span text:style-name="T8">ROS </text:span><text:span text:style-name="T11">بمكان ملفات البايثون وبيدي أوامر لإنشاء اختصارات </text:span><text:span text:style-name="T8">(Entry Points) </text:span><text:span text:style-name="T11">عشان نشغل الكود كأمر في التيرمينال</text:span><text:span text:style-name="T8">.</text:span>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9">setup.cfg</text:span></text:span></text:p>
          </table:table-cell>
          <table:table-cell table:style-name="Table1.A1" office:value-type="string">
            <text:p text:style-name="P3"><text:span text:style-name="T11">ملف توجيهي؛ وظيفته التأكد إن ملفات التشغيل بتروح لفولدر الـ </text:span><text:span text:style-name="Source_20_Text"><text:span text:style-name="T8">lib</text:span></text:span><text:span text:style-name="T8"> </text:span><text:span text:style-name="T11">عشان الـ </text:span><text:span text:style-name="Source_20_Text"><text:span text:style-name="T8">ros2 launch</text:span></text:span><text:span text:style-name="T8"> </text:span><text:span text:style-name="T11">يقدر يشوفها</text:span><text:span text:style-name="T8">.</text:span>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9">lever_detector.py</text:span></text:span></text:p>
          </table:table-cell>
          <table:table-cell table:style-name="Table1.A1" office:value-type="string">
            <text:p text:style-name="P3"><text:span text:style-name="T8">"</text:span><text:span text:style-name="T11">عقل النظام</text:span><text:span text:style-name="T8">"</text:span><text:span text:style-name="T11">؛ الكود اللي بيسحب الصور من الكاميرا، بيشغل </text:span><text:span text:style-name="T8">YOLOv8</text:span><text:span text:style-name="T11">، بيحسب الـ </text:span><text:span text:style-name="T8">Depth</text:span><text:span text:style-name="T11">، وبيطبق معامل المعايرة </text:span><text:span text:style-name="T8">(-49mm).</text:span>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9">robot_bringup.launch.py</text:span></text:span></text:p>
          </table:table-cell>
          <table:table-cell table:style-name="Table1.A1" office:value-type="string">
            <text:p text:style-name="P3"><text:span text:style-name="T8">"</text:span><text:span text:style-name="T11">المايسترو</text:span><text:span text:style-name="T8">"</text:span><text:span text:style-name="T11">؛ ملف تشغيل آلي بيفتح الكاميرا، بيفعل التحويلات الهندسية </text:span><text:span text:style-name="T8">(TFs)</text:span><text:span text:style-name="T11">، وبيشغل كود الـ </text:span><text:span text:style-name="T8">YOLO </text:span><text:span text:style-name="T11">بضغطة واحدة</text:span><text:span text:style-name="T8">.</text:span>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9">resource/lever_vision_model</text:span></text:span></text:p>
          </table:table-cell>
          <table:table-cell table:style-name="Table1.A1" office:value-type="string">
            <text:p text:style-name="P3"><text:span text:style-name="T11">ملف فاضي </text:span><text:span text:style-name="T8">(Marker) </text:span><text:span text:style-name="T11">وظيفته الوحيدة إن الـ </text:span><text:span text:style-name="T8">ROS2 "</text:span><text:span text:style-name="T11">يشم</text:span><text:span text:style-name="T8">" </text:span><text:span text:style-name="T11">إن الفولدر ده باكدج</text:span><text:span text:style-name="T8">.</text:span></text:p>
          </table:table-cell>
        </table:table-row>
      </table:table>
      <text:p text:style-name="Horizontal_20_Line"/>
      <text:h text:style-name="P2" text:outline-level="2"><text:span text:style-name="T6">3. </text:span><text:span text:style-name="T7">التسلسل الزمني للخطوات </text:span><text:span text:style-name="T6">(Step-by-Step Evolution)</text:span></text:h>
      <text:h text:style-name="P5" text:outline-level="3"><text:span text:style-name="T12">الخطوة الأولى</text:span><text:span text:style-name="T9">: </text:span><text:span text:style-name="T12">تنظيم الهيكل الداخلي</text:span></text:h>
      <text:p text:style-name="P4"><text:span text:style-name="T11">تم نقل ملفات الكود إلى مجلد داخلي بنفس اسم الباكدج </text:span><text:span text:style-name="Source_20_Text"><text:span text:style-name="T8">lever_vision_model</text:span></text:span><text:span text:style-name="T8"> </text:span><text:span text:style-name="T11">وإضافة ملف </text:span><text:span text:style-name="Source_20_Text"><text:span text:style-name="T8">__init__.py</text:span></text:span><text:span text:style-name="T8">.</text:span></text:p>
      <text:list xml:id="list4129082635" text:style-name="L6">
        <text:list-item>
          <text:p text:style-name="P20"><text:span text:style-name="T12">السبب</text:span><text:span text:style-name="T9">:</text:span><text:span text:style-name="T8"> </text:span><text:span text:style-name="T11">قواعد بايثون و </text:span><text:span text:style-name="T8">ROS2 </text:span><text:span text:style-name="T11">بتشترط وجود المجلد ده عشان تقدر تستدعي الكود </text:span><text:span text:style-name="T8">(Import) </text:span><text:span text:style-name="T11">بشكل سليم</text:span><text:span text:style-name="T8">.</text:span></text:p>
        </text:list-item>
      </text:list>
      <text:h text:style-name="P5" text:outline-level="3"><text:span text:style-name="T12">الخطوة الثانية</text:span><text:span text:style-name="T9">: </text:span><text:span text:style-name="T12">معايرة المسافات </text:span><text:span text:style-name="T9">(Calibration &amp; Filtering)</text:span></text:h>
      <text:p text:style-name="P4"><text:span text:style-name="T11">تم تعديل كود الـ </text:span><text:span text:style-name="T8">Detection </text:span><text:span text:style-name="T11">ليقوم بالآتي</text:span><text:span text:style-name="T8">:</text:span></text:p>
      <text:list xml:id="list3067895051" text:style-name="L7">
        <text:list-item>
          <text:p text:style-name="P21"><text:span text:style-name="T11">تطبيق </text:span><text:span text:style-name="T9">Spatial Median Filter</text:span><text:span text:style-name="T8">: </text:span><text:span text:style-name="T11">فحص مربع </text:span><text:span text:style-name="T8">$5 \times 5$ </text:span><text:span text:style-name="T11">بكسل حول النقطة المكتشفة لتفادي القراءات الصفرية </text:span><text:span text:style-name="T8">(Noise).</text:span></text:p>
        </text:list-item>
        <text:list-item>
          <text:p text:style-name="P21"><text:span text:style-name="T11">إضافة </text:span><text:span text:style-name="T9">Calibration Offset</text:span><text:span text:style-name="T8">: </text:span><text:span text:style-name="T11">طرح </text:span><text:span text:style-name="T9">49mm</text:span><text:span text:style-name="T8"> </text:span><text:span text:style-name="T11">من قراءة الحساس لتعويض المسافة الفيزيائية بين عدسة الكاميرا وواجهة الروبوت</text:span><text:span text:style-name="T8">.</text:span></text:p>
        </text:list-item>
      </text:list>
      <text:h text:style-name="P5" text:outline-level="3"><text:span text:style-name="T12">الخطوة الثالثة</text:span><text:span text:style-name="T9">: </text:span><text:span text:style-name="T12">الربط الهندسي </text:span><text:span text:style-name="T9">(Static TFs)</text:span></text:h>
      <text:p text:style-name="P4"><text:span text:style-name="T11">تم تعريف علاقات الأبعاد بين قطع الروبوت في ملف اللانش</text:span><text:span text:style-name="T8">:</text:span></text:p>
      <text:list xml:id="list1645553002" text:style-name="L8">
        <text:list-item>
          <text:p text:style-name="P22"><text:span text:style-name="T11">المسافة من مركز الروبوت </text:span><text:span text:style-name="T8">(</text:span><text:span text:style-name="Source_20_Text"><text:span text:style-name="T8">base_link</text:span></text:span><text:span text:style-name="T8">) </text:span><text:span text:style-name="T11">إلى الكاميرا </text:span><text:span text:style-name="T8">(</text:span><text:span text:style-name="Source_20_Text"><text:span text:style-name="T8">camera_link</text:span></text:span><text:span text:style-name="T8">).</text:span></text:p>
        </text:list-item>
        <text:list-item>
          <text:p text:style-name="P22"><text:span text:style-name="T11">المسافة من مركز الروبوت إلى قاعدة الذراع </text:span><text:span text:style-name="T8">(</text:span><text:span text:style-name="Source_20_Text"><text:span text:style-name="T8">arm_base_link</text:span></text:span><text:span text:style-name="T8">).</text:span></text:p>
        </text:list-item>
      </text:list>
      <text:p text:style-name="Horizontal_20_Line"/>
      <text:h text:style-name="P2" text:outline-level="2"><text:soft-page-break/><text:span text:style-name="T6">4. </text:span><text:span text:style-name="T7">المشاكل التقنية وحلولها </text:span><text:span text:style-name="T6">(Troubleshooting Log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<text:span text:style-name="Strong_20_Emphasis"><text:span text:style-name="T11">المشكلة</text:span></text:span></text:p>
            </table:table-cell>
            <table:table-cell table:style-name="Table2.A1" office:value-type="string">
              <text:p text:style-name="P7"><text:span text:style-name="Strong_20_Emphasis"><text:span text:style-name="T11">السبب التقني</text:span></text:span></text:p>
            </table:table-cell>
            <table:table-cell table:style-name="Table2.A1" office:value-type="string">
              <text:p text:style-name="P7"><text:span text:style-name="Strong_20_Emphasis"><text:span text:style-name="T11">الحل</text:span></text:span></text:p>
            </table:table-cell>
          </table:table-row>
        </table:table-header-rows>
        <table:table-row>
          <table:table-cell table:style-name="Table2.A1" office:value-type="string">
            <text:p text:style-name="P9">Package not found</text:p>
          </table:table-cell>
          <table:table-cell table:style-name="Table2.A1" office:value-type="string">
            <text:p text:style-name="P3"><text:span text:style-name="T11">غياب ملف الـ </text:span><text:span text:style-name="T8">Marker </text:span><text:span text:style-name="T11">في مجلد </text:span><text:span text:style-name="Source_20_Text"><text:span text:style-name="T8">resource</text:span></text:span><text:span text:style-name="T8">.</text:span></text:p>
          </table:table-cell>
          <table:table-cell table:style-name="Table2.A1" office:value-type="string">
            <text:p text:style-name="P3"><text:span text:style-name="T11">إنشاء ملف فاضي بنفس اسم الباكدج داخل </text:span><text:span text:style-name="Source_20_Text"><text:span text:style-name="T8">resource/</text:span></text:span><text:span text:style-name="T8">.</text:span></text:p>
          </table:table-cell>
        </table:table-row>
        <table:table-row>
          <table:table-cell table:style-name="Table2.A1" office:value-type="string">
            <text:p text:style-name="P9">libexec directory does not exist</text:p>
          </table:table-cell>
          <table:table-cell table:style-name="Table2.A1" office:value-type="string">
            <text:p text:style-name="P3"><text:span text:style-name="T11">ملف اللانش كان بيدور على </text:span><text:span text:style-name="Source_20_Text"><text:span text:style-name="T8">lever_detector.py</text:span></text:span><text:span text:style-name="T8"> </text:span><text:span text:style-name="T11">بينما الـ </text:span><text:span text:style-name="T8">ROS </text:span><text:span text:style-name="T11">مسميه </text:span><text:span text:style-name="Source_20_Text"><text:span text:style-name="T8">lever_detector</text:span></text:span><text:span text:style-name="T8">.</text:span></text:p>
          </table:table-cell>
          <table:table-cell table:style-name="Table2.A1" office:value-type="string">
            <text:p text:style-name="P3"><text:span text:style-name="T11">مسح الامتداد </text:span><text:span text:style-name="Source_20_Text"><text:span text:style-name="T8">.py</text:span></text:span><text:span text:style-name="T8"> </text:span><text:span text:style-name="T11">من اسم الـ </text:span><text:span text:style-name="T8">executable </text:span><text:span text:style-name="T11">داخل ملف اللانش</text:span><text:span text:style-name="T8">.</text:span></text:p>
          </table:table-cell>
        </table:table-row>
        <table:table-row>
          <table:table-cell table:style-name="Table2.A1" office:value-type="string">
            <text:p text:style-name="P9">Fixed Frame [map] Error</text:p>
          </table:table-cell>
          <table:table-cell table:style-name="Table2.A1" office:value-type="string">
            <text:p text:style-name="P3"><text:span text:style-name="T11">الـ </text:span><text:span text:style-name="T8">RViz </text:span><text:span text:style-name="T11">بيدور على خريطة عالمية مش موجودة</text:span><text:span text:style-name="T8">.</text:span></text:p>
          </table:table-cell>
          <table:table-cell table:style-name="Table2.A1" office:value-type="string">
            <text:p text:style-name="P3"><text:span text:style-name="T11">تغيير الـ </text:span><text:span text:style-name="T8">Fixed Frame </text:span><text:span text:style-name="T11">في إعدادات </text:span><text:span text:style-name="T8">RViz </text:span><text:span text:style-name="T11">إلى </text:span><text:span text:style-name="Source_20_Text"><text:span text:style-name="T8">base_link</text:span></text:span><text:span text:style-name="T8">.</text:span></text:p>
          </table:table-cell>
        </table:table-row>
        <table:table-row>
          <table:table-cell table:style-name="Table2.A1" office:value-type="string">
            <text:p text:style-name="P9">Setup configuration error</text:p>
          </table:table-cell>
          <table:table-cell table:style-name="Table2.A1" office:value-type="string">
            <text:p text:style-name="P3"><text:span text:style-name="T11">غياب ملف </text:span><text:span text:style-name="Source_20_Text"><text:span text:style-name="T8">setup.cfg</text:span></text:span><text:span text:style-name="T8"> </text:span><text:span text:style-name="T11">منع إنشاء ملفات التشغيل في فولدر الـ </text:span><text:span text:style-name="Source_20_Text"><text:span text:style-name="T8">lib</text:span></text:span><text:span text:style-name="T8">.</text:span></text:p>
          </table:table-cell>
          <table:table-cell table:style-name="Table2.A1" office:value-type="string">
            <text:p text:style-name="P3"><text:span text:style-name="T11">إنشاء ملف </text:span><text:span text:style-name="Source_20_Text"><text:span text:style-name="T8">setup.cfg</text:span></text:span><text:span text:style-name="T8"> </text:span><text:span text:style-name="T11">بتنسيق </text:span><text:span text:style-name="Source_20_Text"><text:span text:style-name="T8">install_scripts</text:span></text:span><text:span text:style-name="T8">.</text:span></text:p>
          </table:table-cell>
        </table:table-row>
      </table:table>
      <text:p text:style-name="Horizontal_20_Line"/>
      <text:h text:style-name="P2" text:outline-level="2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" text:outline-level="2"><text:span text:style-name="T6">5. </text:span><text:span text:style-name="T7">دليل التشغيل </text:span><text:span text:style-name="T6">(Operation Manual)</text:span></text:h>
      <text:p text:style-name="P4"><text:span text:style-name="T11">عشان تشغل السيستم بالكامل بعد أي تعديل، لازم تنفذ الأوامر دي في التيرمينال</text:span><text:span text:style-name="T8">:</text:span></text:p>
      <text:h text:style-name="P5" text:outline-level="3"><text:span text:style-name="T12">أولاً</text:span><text:span text:style-name="T9">: </text:span><text:span text:style-name="T12">بناء النظام </text:span><text:span text:style-name="T9">(Build)</text:span></text:h>
      <text:p text:style-name="P10">Bash</text:p>
      <text:p text:style-name="P6"><text:span text:style-name="Source_20_Text">source /opt/ros/humble/setup.bash</text:span></text:p>
      <text:p text:style-name="P6"><text:span text:style-name="Source_20_Text">cd ~/ros2_ws</text:span></text:p>
      <text:p text:style-name="P8"><text:span text:style-name="Source_20_Text"><text:span text:style-name="T8">rm -rf build/ install/ log/ <text:s/># </text:span></text:span><text:span text:style-name="Source_20_Text"><text:span text:style-name="T11">مسح قديم للتأكد من النظافة</text:span></text:span></text:p>
      <text:p text:style-name="P6"><text:span text:style-name="Source_20_Text">colcon build</text:span></text:p>
      <text:p text:style-name="P6"><text:span text:style-name="Source_20_Text">source install/setup.bash</text:span></text:p>
      <text:h text:style-name="P5" text:outline-level="3"><text:span text:style-name="T12">ثانياً</text:span><text:span text:style-name="T9">: </text:span><text:span text:style-name="T12">تشغيل الروبوت </text:span><text:span text:style-name="T9">(Launch)</text:span></text:h>
      <text:p text:style-name="P10">Bash</text:p>
      <text:p text:style-name="P6"><text:span text:style-name="Source_20_Text"><text:span text:style-name="T8">ros2 launch lever_vision_model robot_bringup.launch.py</text:span></text:span></text:p>
      <text:h text:style-name="P5" text:outline-level="3"><text:soft-page-break/><text:span text:style-name="T12">ثالثاً</text:span><text:span text:style-name="T9">: </text:span><text:span text:style-name="T12">المراقبة البصرية </text:span><text:span text:style-name="T9">(Visualization)</text:span></text:h>
      <text:p text:style-name="P4"><text:span text:style-name="T8">(</text:span><text:span text:style-name="T11">في تيرمينال جديد</text:span><text:span text:style-name="T8">)</text:span></text:p>
      <text:p text:style-name="P10">Bash</text:p>
      <text:p text:style-name="P6"><text:span text:style-name="Source_20_Text"><text:span text:style-name="T8">source ~/ros2_ws/install/setup.bash</text:span></text:span></text:p>
      <text:p text:style-name="P6"><text:span text:style-name="Source_20_Text"><text:span text:style-name="T8">ros2 run rviz2 rviz2</text:span></text:span></text:p>
      <text:p text:style-name="P4"><text:span text:style-name="T13">ثم قم بتغيير الـ </text:span><text:span text:style-name="T10">Fixed Frame </text:span><text:span text:style-name="T13">إلى </text:span><text:span text:style-name="Source_20_Text"><text:span text:style-name="T10">base_link</text:span></text:span><text:span text:style-name="T10"> </text:span><text:span text:style-name="T13">وتفعيل الـ </text:span><text:span text:style-name="T10">TF.</text:span></text:p>
      <text:p text:style-name="Horizontal_20_Line"/>
      <text:p text:style-name="P4"><text:span text:style-name="T12">الوضع الحالي</text:span><text:span text:style-name="T9">:</text:span><text:span text:style-name="T8"> </text:span><text:span text:style-name="T11">النظام الآن </text:span><text:span text:style-name="T8">"</text:span><text:span text:style-name="T11">يُدرك</text:span><text:span text:style-name="T8">" </text:span><text:span text:style-name="T11">البيئة المحيطة، يحدد مكان الهدف بدقة مليمترية، ومرتبط هندسياً بهيكل الروبوت</text:span><text:span text:style-name="T8">.</text:span></text:p>
      <text:p text:style-name="Standard"/>
      <text:p text:style-name="Standard"/>
      <text:p text:style-name="Standard"/>
      <text:p text:style-name="Standard"><text:line-break/><text:span text:style-name="T14">ده لعرض القراءات زي الابعاد والزاويه علي الترمنال </text:span></text:p>
      <text:p text:style-name="Standard">source ~/ros2_ws/install/setup.bash</text:p>
      <text:p text:style-name="Standard">ros2 topic echo /lever_pose_arm</text:p>
      <text:p text:style-name="Standard"/>
      <text:p text:style-name="Standard"/>
      <text:p text:style-name="P14">ده النهود اللي بين الكاميرا وموفت</text:p>
      <text:p text:style-name="Standard"/>
      <text:p text:style-name="Standard">ros2 run lever_vision_model vision_moveit_coordinat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00:31:54.262020051</meta:creation-date>
    <dc:date>2026-04-29T22:40:41.646994404</dc:date>
    <meta:editing-duration>PT3H45M41S</meta:editing-duration>
    <meta:editing-cycles>6</meta:editing-cycles>
    <meta:generator>LibreOffice/7.3.7.2$Linux_X86_64 LibreOffice_project/30$Build-2</meta:generator>
    <meta:document-statistic meta:table-count="2" meta:image-count="0" meta:object-count="0" meta:page-count="7" meta:paragraph-count="139" meta:word-count="956" meta:character-count="6400" meta:non-whitespace-character-count="5585"/>
  </office:meta>
</office:document-meta>
</file>